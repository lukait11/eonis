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615000000A194E6AB36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 style:font-family-generic="swis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style:font-name="Ubuntu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12pt" fo:language="sr" fo:country="RS" officeooo:rsid="000104d6" officeooo:paragraph-rsid="000104d6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20pt" fo:language="sr" fo:country="RS" officeooo:rsid="000104d6" officeooo:paragraph-rsid="000104d6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28pt" fo:language="sr" fo:country="RS" fo:font-weight="bold" officeooo:rsid="000104d6" officeooo:paragraph-rsid="000104d6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" fo:font-size="12pt" fo:language="sr" fo:country="RS" fo:font-weight="normal" officeooo:rsid="000104d6" officeooo:paragraph-rsid="000104d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20pt" fo:language="sr" fo:country="RS" fo:font-weight="normal" officeooo:rsid="000104d6" officeooo:paragraph-rsid="000104d6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line-height="150%" fo:text-align="left" style:justify-single-word="false"/>
      <style:text-properties style:font-name="Ubuntu" fo:font-size="12pt" fo:language="sr" fo:country="RS" fo:font-weight="normal" officeooo:rsid="000206f3" officeooo:paragraph-rsid="000206f3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rfc-language-tag="sr-Latn-RS" fo:language="sr" fo:script="Latn" fo:country="RS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Пројекат</text:p>
      <text:p text:style-name="P3"/>
      <text:p text:style-name="P3"/>
      <text:p text:style-name="P3"/>
      <text:p text:style-name="P3"/>
      <text:p text:style-name="P5">Веб продавница одеће</text:p>
      <text:p text:style-name="P6"/>
      <text:p text:style-name="P6"/>
      <text:p text:style-name="P6"/>
      <text:p text:style-name="P6"/>
      <text:p text:style-name="P6"/>
      <text:p text:style-name="P6"/>
      <text:p text:style-name="P7">Експлоатација, одржавање и надоградња</text:p>
      <text:p text:style-name="P7">информационих система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1">Аутор:</text:span> Лука Миљановић, <text:span text:style-name="T2">IT11/2022</text:span><text:line-break/><text:span text:style-name="T1">Предметни професор:</text:span> Теодора Вучковић</text:p>
      <text:p text:style-name="P8"><text:span text:style-name="T1">Предметни асистенти:</text:span> Сара Кијановић, Анђела Тодорић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Ubuntu"/>
    </style:style>
    <style:style style:name="MT2" style:family="text">
      <style:text-properties style:font-name="Ubuntu" fo:language="sr" fo:country="RS" officeooo:rsid="000206f3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draw:frame draw:style-name="Mfr1" draw:name="Picture 2113437590 Copy 1" text:anchor-type="char" svg:x="-0.482cm" svg:y="-0.328cm" svg:width="18cm" svg:height="1.864cm" draw:z-index="0"><draw:image xlink:href="Pictures/1000000000000615000000A194E6AB36.jpg" xlink:type="simple" xlink:show="embed" xlink:actuate="onLoad" draw:mime-type="image/jpeg"/></draw:frame></text:p>
      </style:header>
      <style:footer>
        <text:p text:style-name="Footer"><text:span text:style-name="MT1"><text:tab/></text:span><text:span text:style-name="MT2">Академска 2025/2026 година, Нови Сад</text:span></text:p>
      </style:footer>
    </style:master-page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2T16:00:15.182707900</meta:creation-date>
    <dc:date>2026-06-22T16:28:41.354112300</dc:date>
    <meta:editing-duration>PT15M58S</meta:editing-duration>
    <meta:editing-cycles>2</meta:editing-cycles>
    <meta:generator>LibreOffice/26.2.3.2$Windows_X86_64 LibreOffice_project/70e089b17412e4cb7773e41413306b17a2328c34</meta:generator>
    <meta:document-statistic meta:table-count="0" meta:image-count="2" meta:object-count="0" meta:page-count="1" meta:paragraph-count="7" meta:word-count="29" meta:character-count="243" meta:non-whitespace-character-count="220"/>
  </office:meta>
</office:document-meta>
</file>